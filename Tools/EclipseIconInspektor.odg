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B200000518EA85D1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2.575cm" svg:x="1.042cm" svg:y="8.537cm">
          <draw:image xlink:href="Pictures/10000000000007B200000518EA85D1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5:27:13.815105431</meta:creation-date>
    <dc:date>2026-01-29T15:28:45.933320313</dc:date>
    <meta:editing-duration>PT1M33S</meta:editing-duration>
    <meta:editing-cycles>1</meta:editing-cycles>
    <meta:generator>LibreOffice/24.2.7.2$Linux_X86_64 LibreOffice_project/420$Build-2</meta:generator>
    <meta:document-statistic meta:object-count="1"/>
  </office:meta>
</office:document-meta>
</file>